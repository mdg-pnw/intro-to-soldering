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18B5000001D36FF9E9E6.png" manifest:media-type="image/png"/>
  <manifest:file-entry manifest:full-path="Pictures/100000010000007C0000007C3DE6659F.png" manifest:media-type="image/png"/>
  <manifest:file-entry manifest:full-path="Pictures/100000000000032C0000032C6410CA4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  <style:text-properties fo:font-variant="normal" fo:text-transform="none" fo:color="#f4a261" loext:opacity="100%" style:font-name="Georgia1" fo:font-size="18pt" fo:letter-spacing="normal" fo:font-style="normal" fo:font-weight="bold" officeooo:rsid="0002244c" officeooo:paragraph-rsid="0002244c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left="0in" fo:margin-right="0in" fo:margin-top="0.0437in" fo:margin-bottom="0.3354in" style:contextual-spacing="false" fo:line-height="100%" fo:text-align="left" style:justify-single-word="false" fo:orphans="2" fo:widows="2" fo:text-indent="0in" style:auto-text-indent="false"/>
      <style:text-properties fo:font-variant="normal" fo:text-transform="none" fo:color="#333333" loext:opacity="100%" style:font-name="Georgia1" fo:font-size="12pt" fo:letter-spacing="normal" fo:font-style="normal" fo:font-weight="normal" officeooo:rsid="0002244c" officeooo:paragraph-rsid="0002244c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in" fo:margin-right="0in" fo:margin-top="0.0437in" fo:margin-bottom="0.3354in" style:contextual-spacing="false" fo:line-height="100%" fo:orphans="2" fo:widows="2" fo:text-indent="0in" style:auto-text-indent="false"/>
      <style:text-properties style:font-name="Georgia" fo:font-size="14pt" fo:font-weight="bold" officeooo:rsid="0002244c" officeooo:paragraph-rsid="0002244c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x="0.0126in" svg:y="0.0165in" svg:width="1.0118in" svg:height="1.0118in" draw:z-index="0"><draw:image xlink:href="Pictures/100000010000007C0000007C3DE6659F.png" xlink:type="simple" xlink:show="embed" xlink:actuate="onLoad" draw:mime-type="image/png"/></draw:frame>Introduction to Soldering</text:h>
      <text:p text:style-name="P2">A hands-on guide to soldering electronics</text:p>
      <text:p text:style-name="P3"><draw:frame draw:style-name="fr2" draw:name="Image3" text:anchor-type="char" svg:x="3.2in" svg:y="-0.2591in" svg:width="1.25in" svg:height="1.25in" draw:z-index="2"><draw:image xlink:href="Pictures/100000000000032C0000032C6410CA49.png" xlink:type="simple" xlink:show="embed" xlink:actuate="onLoad" draw:mime-type="image/png"/></draw:frame><text:line-break/>i2s.cmmn.com<draw:frame draw:style-name="fr2" draw:name="Image2" text:anchor-type="char" svg:x="0in" svg:y="1.0311in" svg:width="4.5in" svg:height="0.3319in" draw:z-index="1"><draw:image xlink:href="Pictures/10000001000018B5000001D36FF9E9E6.png" xlink:type="simple" xlink:show="embed" xlink:actuate="onLoad" draw:mime-type="image/png"/></draw:frame><text:line-break/>eugenemakerspace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in" fo:page-height="3in" style:num-format="1" style:print-orientation="landscape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9T14:00:30.659330100</meta:creation-date>
    <meta:print-date>2026-06-19T15:05:46.209473700</meta:print-date>
    <dc:date>2026-06-19T15:08:55.081670800</dc:date>
    <meta:editing-duration>PT41M32S</meta:editing-duration>
    <meta:editing-cycles>1</meta:editing-cycles>
    <meta:document-statistic meta:table-count="0" meta:image-count="3" meta:object-count="0" meta:page-count="1" meta:paragraph-count="3" meta:word-count="11" meta:character-count="100" meta:non-whitespace-character-count="91"/>
    <meta:generator>LibreOffice/26.2.4.2$Windows_X86_64 LibreOffice_project/0229ac93fcf0d7cbc6376066c6f35021cef002dc</meta:generator>
  </office:meta>
</office:document-meta>
</file>